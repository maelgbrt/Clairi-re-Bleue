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f88" officeooo:paragraph-rsid="00148f88"/>
    </style:style>
    <style:style style:name="P2" style:family="paragraph" style:parent-style-name="Standard">
      <style:text-properties officeooo:rsid="0016124d" officeooo:paragraph-rsid="0016124d"/>
    </style:style>
    <style:style style:name="P3" style:family="paragraph" style:parent-style-name="Standard">
      <style:text-properties officeooo:rsid="001745bc" officeooo:paragraph-rsid="001745bc"/>
    </style:style>
    <style:style style:name="P4" style:family="paragraph" style:parent-style-name="Standard">
      <style:text-properties officeooo:rsid="0018a5c6" officeooo:paragraph-rsid="0018a5c6"/>
    </style:style>
    <style:style style:name="P5" style:family="paragraph" style:parent-style-name="Standard">
      <style:text-properties officeooo:rsid="00199e6a" officeooo:paragraph-rsid="00199e6a"/>
    </style:style>
    <style:style style:name="P6" style:family="paragraph" style:parent-style-name="Standard">
      <style:text-properties officeooo:rsid="001b09ef" officeooo:paragraph-rsid="001b09ef"/>
    </style:style>
    <style:style style:name="P7" style:family="paragraph" style:parent-style-name="Standard">
      <style:text-properties fo:font-weight="bold" officeooo:rsid="001b09ef" officeooo:paragraph-rsid="001b09ef" style:font-weight-asian="bold" style:font-weight-complex="bold"/>
    </style:style>
    <style:style style:name="P8" style:family="paragraph" style:parent-style-name="Standard">
      <style:text-properties fo:font-weight="normal" officeooo:rsid="001b09ef" officeooo:paragraph-rsid="001b09ef" style:font-weight-asian="normal" style:font-weight-complex="normal"/>
    </style:style>
    <style:style style:name="P9" style:family="paragraph" style:parent-style-name="Standard">
      <style:text-properties officeooo:rsid="0018a5c6" officeooo:paragraph-rsid="001b09ef"/>
    </style:style>
    <style:style style:name="T1" style:family="text">
      <style:text-properties officeooo:rsid="001745bc"/>
    </style:style>
    <style:style style:name="T2" style:family="text">
      <style:text-properties officeooo:rsid="0018a5c6"/>
    </style:style>
    <style:style style:name="T3" style:family="text">
      <style:text-properties officeooo:rsid="00199e6a"/>
    </style:style>
    <style:style style:name="T4" style:family="text">
      <style:text-properties officeooo:rsid="001b09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ilité : Reservation de vacances pr famille resa dactivité/oerlet au gerant / → facile a mnaié intuitif, mobile pc</text:p>
      <text:p text:style-name="P1"/>
      <text:p text:style-name="P1">Focntionnalites</text:p>
      <text:p text:style-name="P1">→sinformer/ reserver des activites</text:p>
      <text:p text:style-name="P1">→ gerer des resef atitions → fil attente</text:p>
      <text:p text:style-name="P1">-→creation planning, geregr une organisations</text:p>
      <text:p text:style-name="P1">permet un contact en tre le clent et l’acdin et les equies → interface facile pr communiquer</text:p>
      <text:p text:style-name="P1">-→informations sur le camping, les prix ect ,,, pas de page de payement 6&gt; camping sur place</text:p>
      <text:p text:style-name="P1">→ interface client → interface admin interface anim</text:p>
      <text:p text:style-name="P1">→ gestion des mails</text:p>
      <text:p text:style-name="P1">→ changement langue<text:tab/> </text:p>
      <text:p text:style-name="P1"/>
      <text:p text:style-name="P1">origanlité → creneaux détache de la file attente → reasa d’emplacement → selection du mois pr voir les emplacments</text:p>
      <text:p text:style-name="P1"/>
      <text:p text:style-name="P1"/>
      <text:p text:style-name="P2">* login,html → formulaire → inscrire /mail/connecter</text:p>
      <text:p text:style-name="P2">*app_login,js → fo<text:span text:style-name="T1">nction recup le sdonnes que l’utilisateur lui donnent, recharge les donnees sans racfraichir la page</text:span></text:p>
      <text:p text:style-name="P2"/>
      <text:p text:style-name="P3">php→ api connection comm a la base fonctions/routeur</text:p>
      <text:p text:style-name="P3"/>
      <text:p text:style-name="P3">,htacess</text:p>
      <text:p text:style-name="P3">PERMETT ADE RECRIRE LES  ROUTES requetes htaccess beau a moche</text:p>
      <text:p text:style-name="P3"/>
      <text:p text:style-name="P3"/>
      <text:p text:style-name="P3">creation de la famille →</text:p>
      <text:p text:style-name="P3">créer <text:span text:style-name="T2">famiklle</text:span></text:p>
      <text:p text:style-name="P4">créer user</text:p>
      <text:p text:style-name="P4">update la famille</text:p>
      <text:p text:style-name="P3"/>
      <text:p text:style-name="P3">file attente →</text:p>
      <text:p text:style-name="P3"/>
      <text:p text:style-name="P4">cration resa</text:p>
      <text:p text:style-name="P4">verif capactite activite</text:p>
      <text:p text:style-name="P4"/>
      <text:p text:style-name="P4">opiton ya ssez de place</text:p>
      <text:p text:style-name="P4"/>
      <text:p text:style-name="P4">creation resa avtivites</text:p>
      <text:p text:style-name="P4">update cap ,activite</text:p>
      <text:p text:style-name="P4"/>
      <text:p text:style-name="P4">delete resa</text:p>
      <text:p text:style-name="P4">supprime la resa</text:p>
      <text:p text:style-name="P4">updata capacite</text:p>
      <text:p text:style-name="P4">while trt que cap activite de lactivite le epermet</text:p>
      <text:p text:style-name="P4">on inscrit ceux en file attente</text:p>
      <text:p text:style-name="P4"/>
      <text:p text:style-name="P4">supprimer de smembre de la resa</text:p>
      <text:p text:style-name="P4">verif nb de personne qui ont resa</text:p>
      <text:p text:style-name="P4">lodif resa</text:p>
      <text:p text:style-name="P4">pdate cap → <text:span text:style-name="T3">verfiier ds la file attente si yen a qui peuvent prendre la place</text:span></text:p>
      <text:p text:style-name="P4"><text:soft-page-break/></text:p>
      <text:p text:style-name="P4"/>
      <text:p text:style-name="P4"/>
      <text:p text:style-name="P4"/>
      <text:p text:style-name="P4">option ya pas assez de place</text:p>
      <text:p text:style-name="P4">si 5 place et ont est 7 on passe ne file attente les 7</text:p>
      <text:p text:style-name="P4"/>
      <text:p text:style-name="P4">crattion resa</text:p>
      <text:p text:style-name="P4">ajoute ligne en file attente</text:p>
      <text:p text:style-name="P4"/>
      <text:p text:style-name="P4">dlete file attente</text:p>
      <text:p text:style-name="P4"/>
      <text:p text:style-name="P4"/>
      <text:p text:style-name="P4">supprimer mb file attente</text:p>
      <text:p text:style-name="P4">verif si mnt le nb de mebre passe ds la cap de lactivite</text:p>
      <text:p text:style-name="P4"/>
      <text:p text:style-name="P4"/>
      <text:p text:style-name="P4"/>
      <text:p text:style-name="P5">organisation :</text:p>
      <text:p text:style-name="P5">documentation enzo</text:p>
      <text:p text:style-name="P5">font end et debut js → quentin et Matélian</text:p>
      <text:p text:style-name="P5">reste</text:p>
      <text:p text:style-name="P5"/>
      <text:p text:style-name="P5">prolème rencotre</text:p>
      <text:p text:style-name="P5">organisation</text:p>
      <text:p text:style-name="P5">saviat pas comment faire→ QESSAYER BCP DE CHOSE DONC UN FICHIER AVEC PLEIN DE PHP → EMPILATION médiocre de js → ts reprnendre du debut et assumer le retard pdt les vacnaces</text:p>
      <text:p text:style-name="P5"/>
      <text:p text:style-name="P5">différnece ede niveau et d’autonomie et d’envie → <text:span text:style-name="T4">garderie</text:span></text:p>
      <text:p text:style-name="P5"/>
      <text:p text:style-name="P5">Solultion → mael coatch mais pbl suivait pas → trop a rattraper et encore a faire-→ qd meme aide mais decision prise trop tard</text:p>
      <text:p text:style-name="P5"/>
      <text:p text:style-name="P6">pas mal de probleme de config --&gt; tulisation de docker</text:p>
      <text:p text:style-name="P6">pbl de file atte et de geston de cela</text:p>
      <text:p text:style-name="P6"/>
      <text:p text:style-name="P6">utilisation de jeton autait ete plsunescessaie mais pbl ne serait ce sur git</text:p>
      <text:p text:style-name="P6"/>
      <text:p text:style-name="P6"/>
      <text:p text:style-name="P7">conclusion</text:p>
      <text:p text:style-name="P8"/>
      <text:p text:style-name="P8">en somme ça m’a permis d’en decouvrir pas ml mais le fait de reparer les erreurs des autres me prennait bcp de temps</text:p>
      <text:p text:style-name="P8"/>
      <text:p text:style-name="P8">2oafges html a la con</text:p>
      <text:p text:style-name="P8"/>
      <text:p text:style-name="P8"/>
      <text:p text:style-name="P8">4 </text:p>
      <text:p text:style-name="P6"/>
      <text:p text:style-name="P6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2T13:44:24.425472985</meta:creation-date>
    <dc:date>2026-05-12T20:17:30.160336903</dc:date>
    <meta:editing-duration>PT5H23M44S</meta:editing-duration>
    <meta:editing-cycles>1</meta:editing-cycles>
    <meta:document-statistic meta:table-count="0" meta:image-count="0" meta:object-count="0" meta:page-count="2" meta:paragraph-count="58" meta:word-count="424" meta:character-count="2386" meta:non-whitespace-character-count="2017"/>
    <meta:generator>LibreOffice/25.8.4.2$Linux_X86_64 LibreOffice_project/580$Build-2</meta:generator>
  </office:meta>
</office:document-meta>
</file>